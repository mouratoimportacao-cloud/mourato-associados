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0.954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19">
      <style:table-cell-properties fo:background-color="#ffffff"/>
    </style:style>
    <style:style style:name="ce5" style:family="table-cell" style:parent-style-name="Default" style:data-style-name="N104">
      <style:table-cell-properties fo:background-color="#ffffff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ffffff"/>
    </style:style>
    <style:style style:name="ce8" style:family="table-cell" style:parent-style-name="Default" style:data-style-name="N10000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7" table:number-columns-repeated="16377"/>
        <table:table-row table:style-name="ro1">
          <table:table-cell table:style-name="ce1" office:value-type="string" calcext:value-type="string">
            <text:p>Código</text:p>
          </table:table-cell>
          <table:table-cell table:style-name="ce10" office:value-type="string" calcext:value-type="string">
            <text:p>Nome do Produto </text:p>
          </table:table-cell>
          <table:table-cell table:style-name="ce10" office:value-type="string" calcext:value-type="string">
            <text:p>Custo USD ($) </text:p>
          </table:table-cell>
          <table:table-cell table:style-name="ce15" office:value-type="string" calcext:value-type="string">
            <text:p>Cotação USD (R$) </text:p>
          </table:table-cell>
          <table:table-cell table:style-name="ce10" office:value-type="string" calcext:value-type="string">
            <text:p>Preço Lojista (R$) </text:p>
          </table:table-cell>
          <table:table-cell table:style-name="ce1" office:value-type="string" calcext:value-type="string">
            <text:p>Quantidade Estoque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 JOSEPH 100ML</text:p>
          </table:table-cell>
          <table:table-cell table:style-name="ce4" office:value-type="currency" office:currency="USD" office:value="21" calcext:value-type="currency">
            <text:p>$21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]*[.D2])*200%" office:value-type="float" office:value="218.4" calcext:value-type="float">
            <text:p>218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Y GIRL NIGUT 85ML</text:p>
          </table:table-cell>
          <table:table-cell table:style-name="ce4" office:value-type="currency" office:currency="USD" office:value="14" calcext:value-type="currency">
            <text:p>$14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]*[.D3])*200%" office:value-type="float" office:value="145.6" calcext:value-type="float">
            <text:p>145,6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SIENE 100ML</text:p>
          </table:table-cell>
          <table:table-cell table:style-name="ce4" office:value-type="currency" office:currency="USD" office:value="20" calcext:value-type="currency">
            <text:p>$20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4]*[.D4])*200%" office:value-type="float" office:value="208" calcext:value-type="float">
            <text:p>208,0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 FARAS MENTHYST 100ML</text:p>
          </table:table-cell>
          <table:table-cell table:style-name="ce4" office:value-type="currency" office:currency="USD" office:value="15" calcext:value-type="currency">
            <text:p>$15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5]*[.D5])*200%" office:value-type="float" office:value="156" calcext:value-type="float">
            <text:p>156,0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K ESSENTIAL 100ML</text:p>
          </table:table-cell>
          <table:table-cell table:style-name="ce4" office:value-type="currency" office:currency="USD" office:value="17" calcext:value-type="currency">
            <text:p>$17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6]*[.D6])*200%" office:value-type="float" office:value="176.8" calcext:value-type="float">
            <text:p>176,8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 EME FOR MAN 100ML</text:p>
          </table:table-cell>
          <table:table-cell table:style-name="ce4" office:value-type="currency" office:currency="USD" office:value="20" calcext:value-type="currency">
            <text:p>$20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7]*[.D7])*200%" office:value-type="float" office:value="208" calcext:value-type="float">
            <text:p>208,0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AIS ROYAL 100M</text:p>
          </table:table-cell>
          <table:table-cell table:style-name="ce4" office:value-type="currency" office:currency="USD" office:value="21" calcext:value-type="currency">
            <text:p>$21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8]*[.D8])*200%" office:value-type="float" office:value="218.4" calcext:value-type="float">
            <text:p>218,4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RF 100ML</text:p>
          </table:table-cell>
          <table:table-cell table:style-name="ce4" office:value-type="currency" office:currency="USD" office:value="18" calcext:value-type="currency">
            <text:p>$18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9]*[.D9])*200%" office:value-type="float" office:value="187.2" calcext:value-type="float">
            <text:p>187,2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HIB 100ML</text:p>
          </table:table-cell>
          <table:table-cell table:style-name="ce4" office:value-type="currency" office:currency="USD" office:value="17" calcext:value-type="currency">
            <text:p>$17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0]*[.D10])*200%" office:value-type="float" office:value="176.8" calcext:value-type="float">
            <text:p>176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AMOR 100ML</text:p>
          </table:table-cell>
          <table:table-cell table:style-name="ce4" office:value-type="currency" office:currency="USD" office:value="19" calcext:value-type="currency">
            <text:p>$19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1]*[.D11])*200%" office:value-type="float" office:value="197.6" calcext:value-type="float">
            <text:p>197,6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JESTIC 100ML</text:p>
          </table:table-cell>
          <table:table-cell table:style-name="ce4" office:value-type="currency" office:currency="USD" office:value="19" calcext:value-type="currency">
            <text:p>$19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2]*[.D12])*200%" office:value-type="float" office:value="197.6" calcext:value-type="float">
            <text:p>197,6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AH AMOUR 100ML</text:p>
          </table:table-cell>
          <table:table-cell table:style-name="ce4" office:value-type="currency" office:currency="USD" office:value="18" calcext:value-type="currency">
            <text:p>$18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3]*[.D13])*200%" office:value-type="float" office:value="187.2" calcext:value-type="float">
            <text:p>187,2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HIB 100ML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4]*[.D14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MP DE MARS 100ML</text:p>
          </table:table-cell>
          <table:table-cell table:style-name="ce4" office:value-type="currency" office:currency="USD" office:value="20" calcext:value-type="currency">
            <text:p>$20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5]*[.D15])*200%" office:value-type="float" office:value="208" calcext:value-type="float">
            <text:p>208,0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TTRE DE VOLTAIRE 100ML</text:p>
          </table:table-cell>
          <table:table-cell table:style-name="ce4" office:value-type="currency" office:currency="USD" office:value="20" calcext:value-type="currency">
            <text:p>$20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6]*[.D16])*200%" office:value-type="float" office:value="208" calcext:value-type="float">
            <text:p>208,0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GRAPH by </text:p>
          </table:table-cell>
          <table:table-cell table:style-name="ce4" office:value-type="currency" office:currency="USD" office:value="18" calcext:value-type="currency">
            <text:p>$18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7]*[.D17])*200%" office:value-type="float" office:value="187.2" calcext:value-type="float">
            <text:p>187,2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y Girl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8]*[.D18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12 Amor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19]*[.D19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oss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0]*[.D20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alvage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1]*[.D21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nvictus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2]*[.D22])*200%" office:value-type="float" office:value="166.4" calcext:value-type="float">
            <text:p>166,4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Paradox </text:p>
          </table:table-cell>
          <table:table-cell table:style-name="ce4" office:value-type="currency" office:currency="USD" office:value="16" calcext:value-type="currency">
            <text:p>$16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3]*[.D23])*200%" office:value-type="float" office:value="166.4" calcext:value-type="float">
            <text:p>166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One Million </text:p>
          </table:table-cell>
          <table:table-cell table:style-name="ce4" office:value-type="currency" office:currency="USD" office:value="17" calcext:value-type="currency">
            <text:p>$17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4]*[.D24])*200%" office:value-type="float" office:value="176.8" calcext:value-type="float">
            <text:p>176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a Vida Es Bella </text:p>
          </table:table-cell>
          <table:table-cell table:style-name="ce4" office:value-type="currency" office:currency="USD" office:value="17" calcext:value-type="currency">
            <text:p>$17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5]*[.D25])*200%" office:value-type="float" office:value="176.8" calcext:value-type="float">
            <text:p>176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exy Sexy </text:p>
          </table:table-cell>
          <table:table-cell table:style-name="ce4" office:value-type="currency" office:currency="USD" office:value="18" calcext:value-type="currency">
            <text:p>$18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6]*[.D26])*200%" office:value-type="float" office:value="187.2" calcext:value-type="float">
            <text:p>187,2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Yara </text:p>
          </table:table-cell>
          <table:table-cell table:style-name="ce4" office:value-type="currency" office:currency="USD" office:value="15" calcext:value-type="currency">
            <text:p>$15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7]*[.D27])*200%" office:value-type="float" office:value="156" calcext:value-type="float">
            <text:p>156,0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arseel</text:p>
          </table:table-cell>
          <table:table-cell table:style-name="ce4" office:value-type="currency" office:currency="USD" office:value="5.79" calcext:value-type="currency">
            <text:p>$5,79</text:p>
          </table:table-cell>
          <table:table-cell office:value-type="float" office:value="5.2" calcext:value-type="float">
            <text:p>5,2</text:p>
          </table:table-cell>
          <table:table-cell table:style-name="ce6" table:formula="of:=([.C28]*[.D28])*200%" office:value-type="float" office:value="60.216" calcext:value-type="float">
            <text:p>60,2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Kit Victoria's Secret Noir Collection – Bare Vanilla  </text:p>
          </table:table-cell>
          <table:table-cell table:style-name="ce4" office:value-type="currency" office:currency="USD" office:value="11" calcext:value-type="currency">
            <text:p>$11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29]*[.D29])*200%" office:value-type="float" office:value="114.4" calcext:value-type="float">
            <text:p>114,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it Mine Yara 25ML</text:p>
          </table:table-cell>
          <table:table-cell table:style-name="ce4" office:value-type="currency" office:currency="USD" office:value="26.5" calcext:value-type="currency">
            <text:p>$26,5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0]*[.D30])*200%" office:value-type="float" office:value="275.6" calcext:value-type="float">
            <text:p>275,6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t Victoria's Secret Bare Vanilla Noir + Amber Romance Noir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1]*[.D31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t Victoria's Secret Romantic + Bare Vanilla Shimmer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2]*[.D32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t Victoria's Secret Pure Seduction Noir + Bare Vanilla Sunkissed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3]*[.D33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it Victoria's Secret Coconut Passion + Coconut Passion Noir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4]*[.D34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it Victoria's Secret Coconut Passion + Coconut Passion Noir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5]*[.D35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it Victoria's Secret Love Spell Noir + Bare Vanilla Decadent</text:p>
          </table:table-cell>
          <table:table-cell table:style-name="ce5" office:value-type="currency" office:currency="BRL" office:value="22" calcext:value-type="currency">
            <text:p>R$ 22,00</text:p>
          </table:table-cell>
          <table:table-cell office:value-type="float" office:value="5.2" calcext:value-type="float">
            <text:p>5,2</text:p>
          </table:table-cell>
          <table:table-cell table:style-name="ce6" table:formula="of:=([.C36]*[.D36])*200%" office:value-type="float" office:value="228.8" calcext:value-type="float">
            <text:p>228,8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style-name="ce6"/>
          <table:table-cell table:number-columns-repeated="2"/>
          <table:table-cell table:style-name="ce9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table:style-name="ce9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style-name="ce9" table:number-columns-repeated="16377"/>
        </table:table-row>
        <table:table-row table:style-name="ro1" table:number-rows-repeated="1048536">
          <table:table-cell table:number-columns-repeated="7"/>
          <table:table-cell table:style-name="ce9" table:number-columns-repeated="16377"/>
        </table:table-row>
        <table:table-row table:style-name="ro1">
          <table:table-cell table:number-columns-repeated="7"/>
          <table:table-cell table:style-name="ce9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0114" number:language="pt" number:country="BR">
      <number:number number:decimal-places="4" number:min-decimal-places="4" number:min-integer-digits="1"/>
    </number:number-style>
    <number:number-style style:name="N10115" number:language="pt" number:country="BR">
      <number:number number:decimal-places="5" number:min-decimal-places="5" number:min-integer-digits="1"/>
    </number:number-style>
    <number:number-style style:name="N10116" number:language="pt" number:country="BR">
      <number:number number:decimal-places="3" number:min-decimal-places="3" number:min-integer-digits="1"/>
    </number:number-style>
    <number:number-style style:name="N10117" number:language="pt" number:country="BR">
      <number:number number:decimal-places="1" number:min-decimal-places="1" number:min-integer-digits="1"/>
    </number:number-style>
    <number:currency-style style:name="N10119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9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6:04:28.751191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9:47:12.164724000</meta:creation-date>
    <dc:date>2026-07-08T16:05:12.248832300</dc:date>
    <meta:editing-duration>PT15M36S</meta:editing-duration>
    <meta:editing-cycles>4</meta:editing-cycles>
    <meta:generator>LibreOffice/26.2.4.2$Windows_X86_64 LibreOffice_project/0229ac93fcf0d7cbc6376066c6f35021cef002dc</meta:generator>
    <meta:document-statistic meta:table-count="1" meta:cell-count="219" meta:object-count="0"/>
  </office:meta>
</office:document-meta>
</file>